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2000000324D7B5B4B.png" manifest:media-type="image/png"/>
  <manifest:file-entry manifest:full-path="Pictures/1000000100000032000000323FC77CCD.png" manifest:media-type="image/png"/>
  <manifest:file-entry manifest:full-path="Pictures/1000000100000032000000321FB01160.png" manifest:media-type="image/png"/>
  <manifest:file-entry manifest:full-path="Pictures/100000010000003200000032C1243B4D.png" manifest:media-type="image/png"/>
  <manifest:file-entry manifest:full-path="Pictures/100000010000003200000032E1A13A26.png" manifest:media-type="image/png"/>
  <manifest:file-entry manifest:full-path="Pictures/10000001000000320000003291BEC2C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64cm" fo:min-width="0.388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135cm" fo:min-width="1.136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64cm" fo:min-width="0.389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135cm" fo:min-width="1.133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641cm" fo:min-width="0.389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135cm" fo:min-width="1.134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135cm" fo:min-width="1.13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641cm" fo:min-width="0.388cm" loext:decorative="false"/>
    </style:style>
    <style:style style:name="gr11" style:family="graphic" style:parent-style-name="standard">
      <style:graphic-properties draw:fill-color="#e6e905" draw:textarea-horizontal-align="justify" draw:textarea-vertical-align="middle" draw:auto-grow-height="false" fo:min-height="0.62cm" fo:min-width="0.389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134cm" fo:min-width="1.192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134cm" fo:min-width="1.191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34cm" fo:min-width="1.617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e6e905" draw:textarea-horizontal-align="justify" draw:textarea-vertical-align="middle" draw:auto-grow-height="false" fo:min-height="0.62cm" fo:min-width="0.386cm" loext:decorative="false"/>
    </style:style>
    <style:style style:name="gr16" style:family="graphic" style:parent-style-name="standard">
      <style:graphic-properties draw:fill-color="#e6e905" draw:textarea-horizontal-align="justify" draw:textarea-vertical-align="middle" draw:auto-grow-height="false" fo:min-height="0.62cm" fo:min-width="0.387cm" loext:decorative="false"/>
    </style:style>
    <style:style style:name="gr17" style:family="graphic" style:parent-style-name="standard">
      <style:graphic-properties draw:fill-color="#e6e905" draw:textarea-horizontal-align="justify" draw:textarea-vertical-align="middle" draw:auto-grow-height="false" fo:min-height="0.62cm" fo:min-width="0.388cm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0.134cm" fo:min-width="1.168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00a933" draw:textarea-horizontal-align="justify" draw:textarea-vertical-align="middle" draw:auto-grow-height="false" fo:min-height="0.344cm" fo:min-width="0.094cm" loext:decorative="false"/>
    </style:style>
    <style:style style:name="gr20" style:family="graphic" style:parent-style-name="standard">
      <style:graphic-properties draw:textarea-horizontal-align="justify" draw:textarea-vertical-align="middle" draw:auto-grow-height="false" fo:min-height="0.132cm" fo:min-width="1.778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134cm" fo:min-width="1.279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00a933" draw:textarea-horizontal-align="justify" draw:textarea-vertical-align="middle" draw:auto-grow-height="false" fo:min-height="0.343cm" fo:min-width="0.094cm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0.133cm" fo:min-width="1.28cm" style:writing-mode="lr-tb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134cm" fo:min-width="1.417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134cm" fo:min-width="1.51cm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133cm" fo:min-width="1.51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e6e905" draw:textarea-horizontal-align="justify" draw:textarea-vertical-align="middle" draw:auto-grow-height="false" fo:min-height="0.619cm" fo:min-width="0.386cm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0.136cm" fo:min-width="1.194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133cm" fo:min-width="1.169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00a933" draw:textarea-horizontal-align="justify" draw:textarea-vertical-align="middle" draw:auto-grow-height="false" fo:min-height="0.344cm" fo:min-width="0.093cm" loext:decorative="false"/>
    </style:style>
    <style:style style:name="gr31" style:family="graphic" style:parent-style-name="standard">
      <style:graphic-properties draw:textarea-horizontal-align="justify" draw:textarea-vertical-align="middle" draw:auto-grow-height="false" fo:min-height="0.134cm" fo:min-width="1.17cm" style:writing-mode="lr-tb" loext:decorative="false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132cm" fo:min-width="1.221cm" style:writing-mode="lr-tb" loext:decorative="false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133cm" fo:min-width="1.171cm" style:writing-mode="lr-tb" loext:decorative="false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134cm" fo:min-width="1.22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00a933" draw:textarea-horizontal-align="justify" draw:textarea-vertical-align="middle" draw:auto-grow-height="false" fo:min-height="0.343cm" fo:min-width="0.093cm" loext:decorative="false"/>
    </style:style>
    <style:style style:name="gr36" style:family="graphic" style:parent-style-name="standard">
      <style:graphic-properties draw:textarea-horizontal-align="justify" draw:textarea-vertical-align="middle" draw:auto-grow-height="false" fo:min-height="0.133cm" fo:min-width="1.423cm" style:writing-mode="lr-tb" loext:decorative="false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134cm" fo:min-width="1.282cm" style:writing-mode="lr-tb" loext:decorative="false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134cm" fo:min-width="1.171cm" style:writing-mode="lr-tb" loext:decorative="false"/>
      <style:paragraph-properties style:writing-mode="lr-tb"/>
    </style:style>
    <style:style style:name="gr39" style:family="graphic" style:parent-style-name="standard">
      <style:graphic-properties draw:fill-color="#00a933" draw:textarea-horizontal-align="justify" draw:textarea-vertical-align="middle" draw:auto-grow-height="false" fo:min-height="0.343cm" fo:min-width="0.092cm" loext:decorative="false"/>
    </style:style>
    <style:style style:name="gr40" style:family="graphic" style:parent-style-name="standard">
      <style:graphic-properties draw:textarea-horizontal-align="justify" draw:textarea-vertical-align="middle" draw:auto-grow-height="false" fo:min-height="0.134cm" fo:min-width="1.283cm" style:writing-mode="lr-tb" loext:decorative="false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135cm" fo:min-width="1.42cm" style:writing-mode="lr-tb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134cm" fo:min-width="1.582cm" style:writing-mode="lr-tb" loext:decorative="false"/>
      <style:paragraph-properties style:writing-mode="lr-tb"/>
    </style:style>
    <style:style style:name="gr43" style:family="graphic">
      <style:graphic-properties style:protect="size" loext:decorative="false"/>
    </style:style>
    <style:style style:name="pr1" style:family="presentation" style:parent-style-name="Predefinito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c9211e" loext:opacity="100%"/>
    </style:style>
    <style:style style:name="P4" style:family="paragraph">
      <loext:graphic-properties draw:fill-color="#ffffff"/>
      <style:paragraph-properties fo:text-align="center"/>
      <style:text-properties fo:font-size="8pt"/>
    </style:style>
    <style:style style:name="P5" style:family="paragraph">
      <style:paragraph-properties fo:text-align="center" style:writing-mode="lr-tb"/>
      <style:text-properties fo:font-size="8pt"/>
    </style:style>
    <style:style style:name="P6" style:family="paragraph">
      <loext:graphic-properties draw:fill-color="#e6e905"/>
      <style:paragraph-properties fo:text-align="center"/>
      <style:text-properties fo:font-size="8pt"/>
    </style:style>
    <style:style style:name="P7" style:family="paragraph">
      <loext:graphic-properties draw:fill-color="#00a933"/>
      <style:paragraph-properties fo:text-align="center"/>
      <style:text-properties fo:font-size="8pt"/>
    </style:style>
    <style:style style:name="P8" style:family="paragraph">
      <loext:graphic-properties draw:fill-color="#ffffff"/>
    </style:style>
    <style:style style:name="T1" style:family="text">
      <style:text-properties fo:color="#c9211e" loext:opacity="100%"/>
    </style:style>
    <style:style style:name="T2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1" draw:layer="layout" svg:width="0.6cm" svg:height="0.6cm" svg:x="8.507cm" svg:y="3.1cm">
          <draw:image xlink:href="Pictures/10000001000000320000003291BEC2C3.png" xlink:type="simple" xlink:show="embed" xlink:actuate="onLoad" draw:mime-type="image/png">
            <text:p/>
          </draw:image>
        </draw:frame>
        <draw:frame draw:style-name="gr1" draw:text-style-name="P1" draw:layer="layout" svg:width="0.6cm" svg:height="0.6cm" svg:x="9cm" svg:y="1.6cm">
          <draw:image xlink:href="Pictures/100000010000003200000032C1243B4D.png" xlink:type="simple" xlink:show="embed" xlink:actuate="onLoad" draw:mime-type="image/png">
            <text:p/>
          </draw:image>
        </draw:frame>
        <draw:frame draw:style-name="gr1" draw:text-style-name="P1" draw:layer="layout" svg:width="0.6cm" svg:height="0.6cm" svg:x="2.236cm" svg:y="0.284cm">
          <draw:image xlink:href="Pictures/1000000100000032000000321FB01160.png" xlink:type="simple" xlink:show="embed" xlink:actuate="onLoad" draw:mime-type="image/png">
            <text:p/>
          </draw:image>
        </draw:frame>
        <draw:frame draw:style-name="gr1" draw:text-style-name="P1" draw:layer="layout" svg:width="0.6cm" svg:height="0.6cm" svg:x="2.3cm" svg:y="1cm">
          <draw:image xlink:href="Pictures/1000000100000032000000323FC77CCD.png" xlink:type="simple" xlink:show="embed" xlink:actuate="onLoad" draw:mime-type="image/png">
            <text:p/>
          </draw:image>
        </draw:frame>
        <draw:frame draw:style-name="gr1" draw:text-style-name="P1" draw:layer="layout" svg:width="0.6cm" svg:height="0.6cm" svg:x="9cm" svg:y="0.9cm">
          <draw:image xlink:href="Pictures/100000010000003200000032E1A13A26.png" xlink:type="simple" xlink:show="embed" xlink:actuate="onLoad" draw:mime-type="image/png">
            <text:p/>
          </draw:image>
        </draw:frame>
        <draw:frame draw:style-name="gr2" draw:text-style-name="P3" draw:layer="layout" svg:width="0.6cm" svg:height="0.6cm" svg:x="2.3cm" svg:y="1.8cm">
          <draw:image xlink:href="Pictures/1000000100000032000000324D7B5B4B.png" xlink:type="simple" xlink:show="embed" xlink:actuate="onLoad" draw:mime-type="image/png">
            <text:p text:style-name="P2"><text:span text:style-name="T1">1</text:span></text:p>
          </draw:image>
        </draw:frame>
        <draw:custom-shape draw:style-name="gr3" draw:text-style-name="P4" draw:layer="layout" svg:width="1.256cm" svg:height="1.258cm" svg:x="0.609cm" svg:y="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36cm" svg:height="0.385cm" svg:x="0.5cm" svg:y="0.499cm">
          <text:p text:style-name="P5"><text:span text:style-name="T2">Mercurio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255cm" svg:height="1.258cm" svg:x="3.912cm" svg:y="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633cm" svg:height="0.385cm" svg:x="3.867cm" svg:y="0.5cm">
          <text:p text:style-name="P5"><text:span text:style-name="T2">Vener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257cm" svg:height="1.259cm" svg:x="7.28cm" svg:y="1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634cm" svg:height="0.385cm" svg:x="7cm" svg:y="0.5cm">
          <text:p text:style-name="P5"><text:span text:style-name="T2">Terra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255cm" svg:height="1.259cm" svg:x="10.821cm" svg:y="1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36cm" svg:height="0.385cm" svg:x="10.5cm" svg:y="0.5cm">
          <text:p text:style-name="P5"><text:span text:style-name="T2">Mart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257cm" svg:height="1.259cm" svg:x="14.043cm" svg:y="1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635cm" svg:height="0.385cm" svg:x="13.792cm" svg:y="0.5cm">
          <text:p text:style-name="P5"><text:span text:style-name="T2">Giov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256cm" svg:height="1.259cm" svg:x="17.582cm" svg:y="1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635cm" svg:height="0.385cm" svg:x="17.51cm" svg:y="0.5cm">
          <text:p text:style-name="P5"><text:span text:style-name="T2">Saturno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255cm" svg:height="1.259cm" svg:x="21.084cm" svg:y="1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634cm" svg:height="0.385cm" svg:x="20.946cm" svg:y="0.5cm">
          <text:p text:style-name="P5"><text:span text:style-name="T2">Urano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257cm" svg:height="1.259cm" svg:x="24.934cm" svg:y="1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36cm" svg:height="0.385cm" svg:x="24.864cm" svg:y="0.5cm">
          <text:p text:style-name="P5"><text:span text:style-name="T2">Nettuno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255cm" svg:height="1.23cm" svg:x="3.768cm" svg:y="1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.692cm" svg:height="0.384cm" svg:x="3.6cm" svg:y="11.784cm">
          <text:p text:style-name="P5"><text:span text:style-name="T2">Cerere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691cm" svg:height="0.384cm" svg:x="6.409cm" svg:y="11.784cm">
          <text:p text:style-name="P5"><text:span text:style-name="T2">Haumea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117cm" svg:height="0.384cm" svg:x="9.483cm" svg:y="11.784cm">
          <text:p text:style-name="P5"><text:span text:style-name="T2">Makemak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692cm" svg:height="0.384cm" svg:x="12.5cm" svg:y="11.784cm">
          <text:p text:style-name="P5"><text:span text:style-name="T2">Eris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252cm" svg:height="1.23cm" svg:x="6.774cm" svg:y="1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1.253cm" svg:height="1.23cm" svg:x="9.779cm" svg:y="1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1.254cm" svg:height="1.23cm" svg:x="12.683cm" svg:y="1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1.668cm" svg:height="0.384cm" svg:x="17.51cm" svg:y="2.472cm">
          <text:p text:style-name="P5"><text:span text:style-name="T2">Mimas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838cm" svg:height="0.838cm" svg:x="17.812cm" svg:y="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2.278cm" svg:height="0.382cm" svg:x="17.51cm" svg:y="3.984cm">
          <text:p text:style-name="P5"><text:span text:style-name="T2">Enceladus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838cm" svg:height="0.84cm" svg:x="17.811cm" svg:y="4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1.779cm" svg:height="0.384cm" svg:x="17.51cm" svg:y="5.493cm">
          <text:p text:style-name="P5"><text:span text:style-name="T2">Tethys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838cm" svg:height="0.839cm" svg:x="17.811cm" svg:y="5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draw:layer="layout" svg:width="1.78cm" svg:height="0.383cm" svg:x="17.51cm" svg:y="7.004cm">
          <text:p text:style-name="P5"><text:span text:style-name="T2">Dione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838cm" svg:height="0.84cm" svg:x="17.812cm" svg:y="7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1.917cm" svg:height="0.384cm" svg:x="17.5cm" svg:y="8.597cm">
          <text:p text:style-name="P5"><text:span text:style-name="T2">Rhea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838cm" svg:height="0.838cm" svg:x="17.812cm" svg:y="9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2.01cm" svg:height="0.384cm" svg:x="17.5cm" svg:y="10.191cm">
          <text:p text:style-name="P5"><text:span text:style-name="T2">Titan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838cm" svg:height="0.838cm" svg:x="17.812cm" svg:y="10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draw:layer="layout" svg:width="2.01cm" svg:height="0.383cm" svg:x="17.5cm" svg:y="11.701cm">
          <text:p text:style-name="P5"><text:span text:style-name="T2">Iapetus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838cm" svg:height="0.838cm" svg:x="17.812cm" svg:y="12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draw:layer="layout" svg:width="1.252cm" svg:height="1.229cm" svg:x="0.764cm" svg:y="12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5" draw:layer="layout" svg:width="1.694cm" svg:height="0.386cm" svg:x="0.606cm" svg:y="11.774cm">
          <text:p text:style-name="P5"><text:span text:style-name="T2">Plutone</text:span>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669cm" svg:height="0.383cm" svg:x="7.138cm" svg:y="2.513cm">
          <text:p text:style-name="P5"><text:span text:style-name="T2">Luna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0.837cm" svg:height="0.838cm" svg:x="7.451cm" svg:y="2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1.67cm" svg:height="0.384cm" svg:x="10.83cm" svg:y="2.473cm">
          <text:p text:style-name="P5"><text:span text:style-name="T2">Phobos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838cm" svg:height="0.838cm" svg:x="11.049cm" svg:y="2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1.721cm" svg:height="0.382cm" svg:x="10.736cm" svg:y="3.984cm">
          <text:p text:style-name="P5"><text:span text:style-name="T2">Deimos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838cm" svg:height="0.84cm" svg:x="11.049cm" svg:y="4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1.671cm" svg:height="0.383cm" svg:x="13.792cm" svg:y="2.513cm">
          <text:p text:style-name="P5"><text:span text:style-name="T2">Io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0.837cm" svg:height="0.838cm" svg:x="14.247cm" svg:y="2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1.72cm" svg:height="0.384cm" svg:x="13.792cm" svg:y="4.024cm">
          <text:p text:style-name="P5"><text:span text:style-name="T2">Europa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0.837cm" svg:height="0.839cm" svg:x="14.246cm" svg:y="4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1.923cm" svg:height="0.383cm" svg:x="13.792cm" svg:y="5.535cm">
          <text:p text:style-name="P5"><text:span text:style-name="T2">Ganimede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0.837cm" svg:height="0.84cm" svg:x="14.246cm" svg:y="5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5" draw:layer="layout" svg:width="1.782cm" svg:height="0.384cm" svg:x="13.934cm" svg:y="7.044cm">
          <text:p text:style-name="P5"><text:span text:style-name="T2">Callisto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0.837cm" svg:height="0.837cm" svg:x="14.247cm" svg:y="7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1.671cm" svg:height="0.384cm" svg:x="21.08cm" svg:y="2.5cm">
          <text:p text:style-name="P5"><text:span text:style-name="T2">Miranda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0.837cm" svg:height="0.838cm" svg:x="21.313cm" svg:y="2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1.721cm" svg:height="0.382cm" svg:x="21.08cm" svg:y="3.983cm">
          <text:p text:style-name="P5"><text:span text:style-name="T2">Ariel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0.836cm" svg:height="0.839cm" svg:x="21.313cm" svg:y="4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5" draw:layer="layout" svg:width="1.782cm" svg:height="0.384cm" svg:x="20.798cm" svg:y="5.5cm">
          <text:p text:style-name="P5"><text:span text:style-name="T2">Umbriel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0.836cm" svg:height="0.839cm" svg:x="21.31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5" draw:layer="layout" svg:width="1.783cm" svg:height="0.384cm" svg:x="21.08cm" svg:y="7cm">
          <text:p text:style-name="P5"><text:span text:style-name="T2">Titania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0.837cm" svg:height="0.84cm" svg:x="21.313cm" svg:y="7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1.92cm" svg:height="0.385cm" svg:x="21.08cm" svg:y="8.615cm">
          <text:p text:style-name="P5"><text:span text:style-name="T2">Ober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0.837cm" svg:height="0.838cm" svg:x="21.313cm" svg:y="9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1.671cm" svg:height="0.384cm" svg:x="24.829cm" svg:y="2.472cm">
          <text:p text:style-name="P5"><text:span text:style-name="T2">Tritone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0.837cm" svg:height="0.838cm" svg:x="25.163cm" svg:y="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5" draw:layer="layout" svg:width="2.082cm" svg:height="0.384cm" svg:x="0.388cm" svg:y="13.701cm">
          <text:p text:style-name="P5"><text:span text:style-name="T2">Caronte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0.837cm" svg:height="0.838cm" svg:x="0.919cm" svg:y="14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6cm" svg:height="0.6cm" svg:x="5.6cm" svg:y="0.284cm">
          <draw:image xlink:href="Pictures/1000000100000032000000321FB01160.png" xlink:type="simple" xlink:show="embed" xlink:actuate="onLoad" draw:mime-type="image/png">
            <text:p/>
          </draw:image>
        </draw:frame>
        <draw:frame draw:style-name="gr1" draw:text-style-name="P1" draw:layer="layout" svg:width="0.6cm" svg:height="0.6cm" svg:x="5.664cm" svg:y="1cm">
          <draw:image xlink:href="Pictures/1000000100000032000000323FC77CCD.png" xlink:type="simple" xlink:show="embed" xlink:actuate="onLoad" draw:mime-type="image/png">
            <text:p/>
          </draw:image>
        </draw:frame>
        <draw:frame draw:style-name="gr2" draw:text-style-name="P3" draw:layer="layout" svg:width="0.6cm" svg:height="0.6cm" svg:x="15.284cm" svg:y="7.643cm">
          <draw:image xlink:href="Pictures/1000000100000032000000324D7B5B4B.png" xlink:type="simple" xlink:show="embed" xlink:actuate="onLoad" draw:mime-type="image/png">
            <text:p text:style-name="P2"><text:span text:style-name="T1">1</text:span></text:p>
          </draw:image>
        </draw:frame>
        <draw:frame draw:style-name="gr1" draw:text-style-name="P1" draw:layer="layout" svg:width="0.6cm" svg:height="0.6cm" svg:x="8.9cm" svg:y="0.2cm">
          <draw:image xlink:href="Pictures/1000000100000032000000321FB01160.png" xlink:type="simple" xlink:show="embed" xlink:actuate="onLoad" draw:mime-type="image/png">
            <text:p/>
          </draw:image>
        </draw:frame>
        <draw:frame draw:style-name="gr2" draw:text-style-name="P3" draw:layer="layout" svg:width="0.6cm" svg:height="0.6cm" svg:x="9cm" svg:y="2.3cm">
          <draw:image xlink:href="Pictures/1000000100000032000000324D7B5B4B.png" xlink:type="simple" xlink:show="embed" xlink:actuate="onLoad" draw:mime-type="image/png">
            <text:p text:style-name="P2"><text:span text:style-name="T1">1</text:span></text:p>
          </draw:image>
        </draw:frame>
        <draw:frame draw:style-name="gr1" draw:text-style-name="P1" draw:layer="layout" svg:width="0.6cm" svg:height="0.6cm" svg:x="12.4cm" svg:y="0.9cm">
          <draw:image xlink:href="Pictures/100000010000003200000032E1A13A26.png" xlink:type="simple" xlink:show="embed" xlink:actuate="onLoad" draw:mime-type="image/png">
            <text:p/>
          </draw:image>
        </draw:frame>
        <draw:frame draw:style-name="gr1" draw:text-style-name="P1" draw:layer="layout" svg:width="0.6cm" svg:height="0.6cm" svg:x="12.3cm" svg:y="0.2cm">
          <draw:image xlink:href="Pictures/1000000100000032000000321FB01160.png" xlink:type="simple" xlink:show="embed" xlink:actuate="onLoad" draw:mime-type="image/png">
            <text:p/>
          </draw:image>
        </draw:frame>
        <draw:frame draw:style-name="gr1" draw:text-style-name="P1" draw:layer="layout" svg:width="0.6cm" svg:height="0.6cm" svg:x="15.5cm" svg:y="0.4cm">
          <draw:image xlink:href="Pictures/1000000100000032000000321FB01160.png" xlink:type="simple" xlink:show="embed" xlink:actuate="onLoad" draw:mime-type="image/png">
            <text:p/>
          </draw:image>
        </draw:frame>
        <draw:frame draw:style-name="gr1" draw:text-style-name="P1" draw:layer="layout" svg:width="0.6cm" svg:height="0.6cm" svg:x="15.6cm" svg:y="1.1cm">
          <draw:image xlink:href="Pictures/100000010000003200000032C1243B4D.png" xlink:type="simple" xlink:show="embed" xlink:actuate="onLoad" draw:mime-type="image/png">
            <text:p/>
          </draw:image>
        </draw:frame>
        <draw:frame draw:style-name="gr1" draw:text-style-name="P1" draw:layer="layout" svg:width="0.6cm" svg:height="0.6cm" svg:x="15.284cm" svg:y="3.1cm">
          <draw:image xlink:href="Pictures/10000001000000320000003291BEC2C3.png" xlink:type="simple" xlink:show="embed" xlink:actuate="onLoad" draw:mime-type="image/png">
            <text:p/>
          </draw:image>
        </draw:frame>
        <draw:frame draw:style-name="gr1" draw:text-style-name="P1" draw:layer="layout" svg:width="0.6cm" svg:height="0.6cm" svg:x="19.238cm" svg:y="0.485cm">
          <draw:image xlink:href="Pictures/1000000100000032000000321FB01160.png" xlink:type="simple" xlink:show="embed" xlink:actuate="onLoad" draw:mime-type="image/png">
            <text:p/>
          </draw:image>
        </draw:frame>
        <draw:frame draw:style-name="gr1" draw:text-style-name="P1" draw:layer="layout" svg:width="0.6cm" svg:height="0.6cm" svg:x="19.338cm" svg:y="1.185cm">
          <draw:image xlink:href="Pictures/100000010000003200000032C1243B4D.png" xlink:type="simple" xlink:show="embed" xlink:actuate="onLoad" draw:mime-type="image/png">
            <text:p/>
          </draw:image>
        </draw:frame>
        <draw:frame draw:style-name="gr1" draw:text-style-name="P1" draw:layer="layout" svg:width="0.6cm" svg:height="0.6cm" svg:x="18.9cm" svg:y="4.5cm">
          <draw:image xlink:href="Pictures/10000001000000320000003291BEC2C3.png" xlink:type="simple" xlink:show="embed" xlink:actuate="onLoad" draw:mime-type="image/png">
            <text:p/>
          </draw:image>
        </draw:frame>
        <draw:frame draw:style-name="gr1" draw:text-style-name="P1" draw:layer="layout" svg:width="0.6cm" svg:height="0.6cm" svg:x="22.7cm" svg:y="0.9cm">
          <draw:image xlink:href="Pictures/1000000100000032000000321FB01160.png" xlink:type="simple" xlink:show="embed" xlink:actuate="onLoad" draw:mime-type="image/png">
            <text:p/>
          </draw:image>
        </draw:frame>
        <draw:frame draw:style-name="gr1" draw:text-style-name="P1" draw:layer="layout" svg:width="0.6cm" svg:height="0.6cm" svg:x="22.4cm" svg:y="9.2cm">
          <draw:image xlink:href="Pictures/10000001000000320000003291BEC2C3.png" xlink:type="simple" xlink:show="embed" xlink:actuate="onLoad" draw:mime-type="image/png">
            <text:p/>
          </draw:image>
        </draw:frame>
        <draw:frame draw:style-name="gr1" draw:text-style-name="P1" draw:layer="layout" svg:width="0.6cm" svg:height="0.6cm" svg:x="26.4cm" svg:y="0.9cm">
          <draw:image xlink:href="Pictures/1000000100000032000000321FB01160.png" xlink:type="simple" xlink:show="embed" xlink:actuate="onLoad" draw:mime-type="image/png">
            <text:p/>
          </draw:image>
        </draw:frame>
        <draw:frame draw:style-name="gr1" draw:text-style-name="P1" draw:layer="layout" svg:width="0.6cm" svg:height="0.6cm" svg:x="26.5cm" svg:y="1.7cm">
          <draw:image xlink:href="Pictures/100000010000003200000032E1A13A26.png" xlink:type="simple" xlink:show="embed" xlink:actuate="onLoad" draw:mime-type="image/png">
            <text:p/>
          </draw:image>
        </draw:frame>
        <draw:frame draw:style-name="gr1" draw:text-style-name="P1" draw:layer="layout" svg:width="0.6cm" svg:height="0.6cm" svg:x="2.3cm" svg:y="12.5cm">
          <draw:image xlink:href="Pictures/1000000100000032000000323FC77CCD.png" xlink:type="simple" xlink:show="embed" xlink:actuate="onLoad" draw:mime-type="image/png">
            <text:p/>
          </draw:image>
        </draw:frame>
        <draw:frame draw:style-name="gr1" draw:text-style-name="P1" draw:layer="layout" svg:width="0.6cm" svg:height="0.6cm" svg:x="5.3cm" svg:y="12.5cm">
          <draw:image xlink:href="Pictures/10000001000000320000003291BEC2C3.png" xlink:type="simple" xlink:show="embed" xlink:actuate="onLoad" draw:mime-type="image/png">
            <text:p/>
          </draw:image>
        </draw:frame>
        <draw:frame draw:style-name="gr1" draw:text-style-name="P1" draw:layer="layout" svg:width="0.6cm" svg:height="0.6cm" svg:x="8.2cm" svg:y="12.5cm">
          <draw:image xlink:href="Pictures/1000000100000032000000323FC77CCD.png" xlink:type="simple" xlink:show="embed" xlink:actuate="onLoad" draw:mime-type="image/png">
            <text:p/>
          </draw:image>
        </draw:frame>
        <draw:frame draw:style-name="gr1" draw:text-style-name="P1" draw:layer="layout" svg:width="0.6cm" svg:height="0.6cm" svg:x="11.2cm" svg:y="12.5cm">
          <draw:image xlink:href="Pictures/1000000100000032000000323FC77CCD.png" xlink:type="simple" xlink:show="embed" xlink:actuate="onLoad" draw:mime-type="image/png">
            <text:p/>
          </draw:image>
        </draw:frame>
        <draw:frame draw:style-name="gr1" draw:text-style-name="P1" draw:layer="layout" svg:width="0.6cm" svg:height="0.6cm" svg:x="14.137cm" svg:y="12.5cm">
          <draw:image xlink:href="Pictures/1000000100000032000000323FC77CCD.png" xlink:type="simple" xlink:show="embed" xlink:actuate="onLoad" draw:mime-type="image/png">
            <text:p/>
          </draw:image>
        </draw:frame>
        <draw:frame draw:style-name="gr1" draw:text-style-name="P1" draw:layer="layout" svg:width="0.6cm" svg:height="0.6cm" svg:x="8.5cm" svg:y="3.8cm">
          <draw:image xlink:href="Pictures/100000010000003200000032E1A13A26.png" xlink:type="simple" xlink:show="embed" xlink:actuate="onLoad" draw:mime-type="image/png">
            <text:p/>
          </draw:image>
        </draw:frame>
        <draw:frame draw:style-name="gr1" draw:text-style-name="P1" draw:layer="layout" svg:width="0.6cm" svg:height="0.6cm" svg:x="15.6cm" svg:y="1.7cm">
          <draw:image xlink:href="Pictures/100000010000003200000032E1A13A26.png" xlink:type="simple" xlink:show="embed" xlink:actuate="onLoad" draw:mime-type="image/png">
            <text:p/>
          </draw:image>
        </draw:frame>
        <draw:frame draw:style-name="gr1" draw:text-style-name="P1" draw:layer="layout" svg:width="0.6cm" svg:height="0.6cm" svg:x="19.3cm" svg:y="1.9cm">
          <draw:image xlink:href="Pictures/100000010000003200000032E1A13A26.png" xlink:type="simple" xlink:show="embed" xlink:actuate="onLoad" draw:mime-type="image/png">
            <text:p/>
          </draw:image>
        </draw:frame>
        <draw:frame draw:style-name="gr1" draw:text-style-name="P1" draw:layer="layout" svg:width="0.6cm" svg:height="0.6cm" svg:x="22.7cm" svg:y="1.6cm">
          <draw:image xlink:href="Pictures/100000010000003200000032E1A13A26.png" xlink:type="simple" xlink:show="embed" xlink:actuate="onLoad" draw:mime-type="image/png">
            <text:p/>
          </draw:image>
        </draw:frame>
        <draw:frame draw:style-name="gr1" draw:text-style-name="P1" draw:layer="layout" svg:width="0.6cm" svg:height="0.6cm" svg:x="12cm" svg:y="4.5cm">
          <draw:image xlink:href="Pictures/10000001000000320000003291BEC2C3.png" xlink:type="simple" xlink:show="embed" xlink:actuate="onLoad" draw:mime-type="image/png">
            <text:p/>
          </draw:image>
        </draw:frame>
        <draw:frame draw:style-name="gr1" draw:text-style-name="P1" draw:layer="layout" svg:width="0.6cm" svg:height="0.6cm" svg:x="15.3cm" svg:y="6.1cm">
          <draw:image xlink:href="Pictures/10000001000000320000003291BEC2C3.png" xlink:type="simple" xlink:show="embed" xlink:actuate="onLoad" draw:mime-type="image/png">
            <text:p/>
          </draw:image>
        </draw:frame>
        <draw:frame draw:style-name="gr1" draw:text-style-name="P1" draw:layer="layout" svg:width="0.6cm" svg:height="0.6cm" svg:x="18.9cm" svg:y="10.8cm">
          <draw:image xlink:href="Pictures/10000001000000320000003291BEC2C3.png" xlink:type="simple" xlink:show="embed" xlink:actuate="onLoad" draw:mime-type="image/png">
            <text:p/>
          </draw:image>
        </draw:frame>
        <draw:frame draw:style-name="gr2" draw:text-style-name="P3" draw:layer="layout" svg:width="0.6cm" svg:height="0.6cm" svg:x="18.9cm" svg:y="12.4cm">
          <draw:image xlink:href="Pictures/1000000100000032000000324D7B5B4B.png" xlink:type="simple" xlink:show="embed" xlink:actuate="onLoad" draw:mime-type="image/png">
            <text:p text:style-name="P2"><text:span text:style-name="T1">1</text:span></text:p>
          </draw:image>
        </draw:frame>
        <draw:frame draw:style-name="gr2" draw:text-style-name="P3" draw:layer="layout" svg:width="0.6cm" svg:height="0.6cm" svg:x="26.2cm" svg:y="3.1cm">
          <draw:image xlink:href="Pictures/1000000100000032000000324D7B5B4B.png" xlink:type="simple" xlink:show="embed" xlink:actuate="onLoad" draw:mime-type="image/png">
            <text:p text:style-name="P2"><text:span text:style-name="T1">1</text:span></text:p>
          </draw:image>
        </draw:frame>
        <draw:frame draw:style-name="gr2" draw:text-style-name="P3" draw:layer="layout" svg:width="0.6cm" svg:height="0.6cm" svg:x="12.1cm" svg:y="3cm">
          <draw:image xlink:href="Pictures/1000000100000032000000324D7B5B4B.png" xlink:type="simple" xlink:show="embed" xlink:actuate="onLoad" draw:mime-type="image/png">
            <text:p text:style-name="P2"><text:span text:style-name="T1">2</text:span></text:p>
          </draw:image>
        </draw:frame>
        <draw:frame draw:style-name="gr2" draw:text-style-name="P3" draw:layer="layout" svg:width="0.6cm" svg:height="0.6cm" svg:x="16.2cm" svg:y="0.4cm">
          <draw:image xlink:href="Pictures/1000000100000032000000324D7B5B4B.png" xlink:type="simple" xlink:show="embed" xlink:actuate="onLoad" draw:mime-type="image/png">
            <text:p text:style-name="P2"><text:span text:style-name="T1">2</text:span></text:p>
          </draw:image>
        </draw:frame>
        <draw:frame draw:style-name="gr2" draw:text-style-name="P3" draw:layer="layout" svg:width="0.6cm" svg:height="0.6cm" svg:x="22.5cm" svg:y="3cm">
          <draw:image xlink:href="Pictures/1000000100000032000000324D7B5B4B.png" xlink:type="simple" xlink:show="embed" xlink:actuate="onLoad" draw:mime-type="image/png">
            <text:p text:style-name="P2"><text:span text:style-name="T1">2</text:span></text:p>
          </draw:image>
        </draw:frame>
        <draw:frame draw:style-name="gr2" draw:text-style-name="P3" draw:layer="layout" svg:width="0.6cm" svg:height="0.6cm" svg:x="5.6cm" svg:y="1.8cm">
          <draw:image xlink:href="Pictures/1000000100000032000000324D7B5B4B.png" xlink:type="simple" xlink:show="embed" xlink:actuate="onLoad" draw:mime-type="image/png">
            <text:p text:style-name="P2"><text:span text:style-name="T1">2</text:span></text:p>
          </draw:image>
        </draw:frame>
        <draw:frame draw:style-name="gr2" draw:text-style-name="P3" draw:layer="layout" svg:width="0.6cm" svg:height="0.6cm" svg:x="15.4cm" svg:y="4.608cm">
          <draw:image xlink:href="Pictures/1000000100000032000000324D7B5B4B.png" xlink:type="simple" xlink:show="embed" xlink:actuate="onLoad" draw:mime-type="image/png">
            <text:p text:style-name="P2"><text:span text:style-name="T1">2</text:span></text:p>
          </draw:image>
        </draw:frame>
        <draw:frame draw:style-name="gr1" draw:text-style-name="P1" draw:layer="layout" svg:width="0.6cm" svg:height="0.6cm" svg:x="18.9cm" svg:y="3cm">
          <draw:image xlink:href="Pictures/1000000100000032000000323FC77CCD.png" xlink:type="simple" xlink:show="embed" xlink:actuate="onLoad" draw:mime-type="image/png">
            <text:p/>
          </draw:image>
        </draw:frame>
        <draw:frame draw:style-name="gr1" draw:text-style-name="P1" draw:layer="layout" svg:width="0.6cm" svg:height="0.6cm" svg:x="26.2cm" svg:y="3.7cm">
          <draw:image xlink:href="Pictures/1000000100000032000000323FC77CCD.png" xlink:type="simple" xlink:show="embed" xlink:actuate="onLoad" draw:mime-type="image/png">
            <text:p/>
          </draw:image>
        </draw:frame>
        <draw:frame draw:style-name="gr2" draw:text-style-name="P3" draw:layer="layout" svg:width="0.6cm" svg:height="0.6cm" svg:x="2cm" svg:y="14.4cm">
          <draw:image xlink:href="Pictures/1000000100000032000000324D7B5B4B.png" xlink:type="simple" xlink:show="embed" xlink:actuate="onLoad" draw:mime-type="image/png">
            <text:p text:style-name="P2"><text:span text:style-name="T1">2</text:span></text:p>
          </draw:image>
        </draw:frame>
        <draw:frame draw:style-name="gr2" draw:text-style-name="P3" draw:layer="layout" svg:width="0.6cm" svg:height="0.6cm" svg:x="5.3cm" svg:y="13.3cm">
          <draw:image xlink:href="Pictures/1000000100000032000000324D7B5B4B.png" xlink:type="simple" xlink:show="embed" xlink:actuate="onLoad" draw:mime-type="image/png">
            <text:p text:style-name="P2"><text:span text:style-name="T1">1</text:span></text:p>
          </draw:image>
        </draw:frame>
        <draw:frame draw:style-name="gr2" draw:text-style-name="P3" draw:layer="layout" svg:width="0.6cm" svg:height="0.6cm" svg:x="22.4cm" svg:y="6cm">
          <draw:image xlink:href="Pictures/1000000100000032000000324D7B5B4B.png" xlink:type="simple" xlink:show="embed" xlink:actuate="onLoad" draw:mime-type="image/png">
            <text:p text:style-name="P2"><text:span text:style-name="T1">1</text:span></text:p>
          </draw:image>
        </draw:frame>
        <draw:frame draw:style-name="gr2" draw:text-style-name="P3" draw:layer="layout" svg:width="0.6cm" svg:height="0.6cm" svg:x="18.9cm" svg:y="7.6cm">
          <draw:image xlink:href="Pictures/1000000100000032000000324D7B5B4B.png" xlink:type="simple" xlink:show="embed" xlink:actuate="onLoad" draw:mime-type="image/png">
            <text:p text:style-name="P2"><text:span text:style-name="T1">2</text:span></text:p>
          </draw:image>
        </draw:frame>
        <draw:frame draw:style-name="gr1" draw:text-style-name="P1" draw:layer="layout" svg:width="0.6cm" svg:height="0.6cm" svg:x="5.336cm" svg:y="11.684cm">
          <draw:image xlink:href="Pictures/1000000100000032000000321FB01160.png" xlink:type="simple" xlink:show="embed" xlink:actuate="onLoad" draw:mime-type="image/png">
            <text:p/>
          </draw:image>
        </draw:frame>
        <draw:frame draw:style-name="gr1" draw:text-style-name="P1" draw:layer="layout" svg:width="0.6cm" svg:height="0.6cm" svg:x="2.336cm" svg:y="11.684cm">
          <draw:image xlink:href="Pictures/1000000100000032000000321FB01160.png" xlink:type="simple" xlink:show="embed" xlink:actuate="onLoad" draw:mime-type="image/png">
            <text:p/>
          </draw:image>
        </draw:frame>
        <presentation:notes draw:style-name="dp2">
          <draw:page-thumbnail draw:style-name="gr43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4:33:27.940388529</meta:creation-date>
    <dc:date>2025-09-10T10:17:45.110710183</dc:date>
    <meta:editing-duration>PT1H24M10S</meta:editing-duration>
    <meta:editing-cycles>40</meta:editing-cycles>
    <meta:generator>LibreOffice/24.2.7.2$Linux_X86_64 LibreOffice_project/420$Build-2</meta:generator>
    <meta:document-statistic meta:object-count="141"/>
  </office:meta>
</office:document-meta>
</file>